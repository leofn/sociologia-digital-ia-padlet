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fo:color="#cc0000" fo:font-weight="bold" style:font-weight-asian="bold"/>
    </style:style>
    <style:style style:name="P4" style:family="paragraph" style:parent-style-name="Standard">
      <style:paragraph-properties fo:text-align="justify" style:justify-single-word="false"/>
      <style:text-properties fo:font-size="8pt" style:font-size-asian="8pt" style:font-size-complex="8pt"/>
    </style:style>
    <style:style style:name="P5" style:family="paragraph" style:parent-style-name="Standard" style:list-style-name="WWNum1">
      <style:paragraph-properties fo:margin-left="0.5in" fo:margin-right="0in" fo:text-align="justify" style:justify-single-word="false" fo:text-indent="-0.25in" style:auto-text-indent="false"/>
    </style:style>
    <style:style style:name="P6" style:family="paragraph" style:parent-style-name="Standard">
      <style:paragraph-properties fo:margin-left="1.5744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fo:font-weight="bold" fo:background-color="#ffe599" loext:char-shading-value="0" style:font-weight-asian="bold"/>
    </style:style>
    <style:style style:name="T3" style:family="text">
      <style:text-properties fo:color="#cc0000" fo:font-weight="bold" style:font-weight-asian="bold"/>
    </style:style>
    <style:style style:name="T4" style:family="text">
      <style:text-properties fo:color="#cc0000" style:text-underline-style="none" fo:font-weight="bold" style:font-weight-asian="bold"/>
    </style:style>
    <style:style style:name="T5" style:family="text">
      <style:text-properties fo:color="#0b5394" fo:font-weight="bold" style:font-weight-asian="bold"/>
    </style:style>
    <style:style style:name="T6" style:family="text">
      <style:text-properties fo:color="#bf9000" fo:font-weight="bold" style:font-weight-asian="bold"/>
    </style:style>
    <style:style style:name="T7" style:family="text">
      <style:text-properties fo:color="#38761d" fo:font-weight="bold" style:font-weight-asian="bold"/>
    </style:style>
    <style:style style:name="T8" style:family="text">
      <style:text-properties fo:color="#38761d"/>
    </style:style>
    <style:style style:name="T9" style:family="text">
      <style:text-properties fo:background-color="#ffe599" loext:char-shading-value="0"/>
    </style:style>
    <style:style style:name="T10" style:family="text">
      <style:text-properties fo:font-size="8pt" style:font-size-asian="8pt" style:font-size-complex="8pt"/>
    </style:style>
    <style:style style:name="T11" style:family="text">
      <style:text-properties fo:font-size="8pt" fo:font-weight="bold" style:font-size-asian="8pt" style:font-weight-asian="bold" style:font-size-complex="8pt"/>
    </style:style>
    <style:style style:name="T12" style:family="text">
      <style:text-properties fo:color="#990000" fo:font-weight="bold" style:font-weight-asian="bold"/>
    </style:style>
    <style:style style:name="T13" style:family="text">
      <style:text-properties fo:color="#351c75" fo:font-weight="bold" style:font-weight-asian="bold"/>
    </style:style>
    <style:style style:name="T14" style:family="text">
      <style:text-properties fo:color="#351c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EDIAÇÃO</text:span></text:p>
      <text:p text:style-name="P1"/>
      <text:list xml:id="list1095632" text:style-name="WWNum1">
        <text:list-item>
          <text:p text:style-name="P5"><text:span text:style-name="T3">INSTITUIÇÃO: DEFINIÇÃO E INTERAÇÕES</text:span></text:p>
        </text:list-item>
      </text:list>
      <text:p text:style-name="P2"/>
      <text:p text:style-name="P1"><text:span text:style-name="T5">[Veri] Sobre algoritmos como “instituições” “interagindo” com instituições tradicionais:</text:span></text:p>
      <text:p text:style-name="P1">O exemplo dos algoritmos de recomendação usados em app de namoro é muito bom para entendermos em que termos eles estão pensando “algoritmos como instituições”. Nessa passagem eles dizem que este é um ótimo caso para pensarmos como “algoritmos enquanto instituições interagem com outras instituições mais tradicionais como o casamento”. Entretanto, não fica claro como é possível considerar ambas “instituições” no mesmo nível ontológico.</text:p>
      <text:p text:style-name="P1"><text:span text:style-name="T5">[Segatto] Mencionam interações entre instituições - IA e casamento -, mas não aprofundam</text:span></text:p>
      <text:p text:style-name="P1"/>
      <text:p text:style-name="P1"><text:span text:style-name="T6">[Píi]</text:span> Dada a centralidade do papel da visibilidade e invisibilidade nas relações de poder dos algoritmos de recomendação, não seria necessário pensar o <text:span text:style-name="T1">papel da moderação e de outras práticas</text:span> de rotulação, classificação, ranqueamento e impulsionamento de conteúdos, usuários e interações? O que parece requerer uma <text:span text:style-name="T1">diferenciação entre ferramentas institucionais</text:span>, seus mecanismos ou componentes<text:span text:style-name="T1"> e uma instituição mais propriamente dita</text:span> – como uma instituição de classificação e distribuição de conteúdos –, com algum grau de autonomia/centralidade organizacional ou critério que justifique a identificação de dado conjunto de ferramentas ou dinâmicas sociais como uma instituição, minimamente discreta. Ao contrário, a indefinição ou tensionamento dos recortes cria categorias completamente escorregadias, vazadas e <text:s/>de difícil operacionalização.</text:p>
      <text:p text:style-name="P1"/>
      <text:p text:style-name="P1"><text:span text:style-name="T1">[Damiani] </text:span><text:s/>Ao tratar o poder de recomendação como um limite à agência dos usuários, em alguns momentos os autores parecem estar mais<text:span text:style-name="T1"> se referindo à interface</text:span> do que aos próprios algoritmos. A possibilidade de interação com o que o algoritmo recomenda ocorre por meio das interfaces, que são justamente o meio pelo qual os dados são gerados para alimentar o funcionamento dos algoritmos. A ação do usuário sobre essas interfaces é o que possibilita a manipulação dos algoritmos, como os próprios autores apontam.</text:p>
      <text:p text:style-name="P1"/>
      <text:p text:style-name="P1"><text:span text:style-name="T1">[Píi]</text:span> Algoritmos parecem ser tratados como<text:span text:style-name="T1"> artefatos sociotécnicos</text:span>, na qualidade de aparelhos tecnológicos com impactos sociais, perante os quais os <text:span text:style-name="T1">comportamentos e escolhas seriam elementos externos</text:span> e influenciáveis por esses artefatos, mas não integrantes dos mesmos. Ao se referir a uma instituição como um algoritmo, é diferente dizer: (1) <text:s/>que, no conjunto das relações integrantes, entre humanos e não-humanos, os algoritmos são o momento determinante; ou (2) que a instituição é literalmente o(s) algoritmo(s). </text:p>
      <text:p text:style-name="P1"/>
      <text:p text:style-name="P1"/>
      <text:list xml:id="list181243782535622" text:continue-numbering="true" text:style-name="WWNum1">
        <text:list-item>
          <text:p text:style-name="P5"><text:span text:style-name="T3">RECOMENDAÇÕES</text:span></text:p>
        </text:list-item>
      </text:list>
      <text:p text:style-name="P1"/>
      <text:p text:style-name="P1"><text:span text:style-name="T7">[Damiani]</text:span><text:span text:style-name="T1"> </text:span>O capítulo sobre os algoritmos de recomendação, por <text:span text:style-name="T1">não se ater a um algoritmo</text:span> específico, dificulta a compreensão. A abordagem genérica, que pressupõe que os algoritmos têm o poder de influenciar preferências e comportamentos em uma relação de causa e efeito direta, pode simplificar excessivamente o fenômeno. Isso acaba por diminuir a <text:span text:style-name="T1">importância de outras variáveis</text:span> que também influenciam as mudanças sociais, mas que não estão diretamente ligadas aos algoritmos.</text:p>
      <text:p text:style-name="P1"><text:span text:style-name="T7">[Guilherme]</text:span><text:span text:style-name="T8"> </text:span>O incômodo sobre <text:span text:style-name="T1">não se aprofundar em um caso</text:span> permanece nesse capítulo de sistemas de recomendação. Minha leitura deste capítulo foi menos atenta.</text:p>
      <text:p text:style-name="P1"/>
      <text:p text:style-name="P1"><text:soft-page-break/><text:span text:style-name="T1">[Píi]</text:span> A recomendação estaria baseada em dados sobre<text:span text:style-name="T1"> usuários, itens e interações</text:span>, porém o capítulo dá muito pouca atenção para o papel constitutivo das interações dos usuários com os itens digitais. A ênfase parece exagerada no caráter automático das recomendações, ignorando todo o <text:span text:style-name="T1">estímulo sobre os usuários para produzirem, classificarem e se apropriarem dos itens</text:span> (conteúdos, avatares e relações) submetidos aos sistemas de recomendação. A presença do usuário parece confinada ao “gaming”, a frustrar as expectativas dos desenvolvedores.</text:p>
      <text:p text:style-name="P2"/>
      <text:p text:style-name="P1"><text:span text:style-name="T1">[Guilherme]</text:span> Interessante como funciona o <text:span text:style-name="T1">esquema de recomendação</text:span>. Mas, para além de serem citados aqueles que costumam ser mais indicados, são sobretudo aqueles que <text:span text:style-name="T1">engajam mais com aqueles que lhe citam [retroalimentação em rede]</text:span>. O <text:span text:style-name="T1">feedback</text:span> parece fundamental no caso do Twitter ou plataformas para professores (e.g. dissertação de Bernardo).</text:p>
      <text:p text:style-name="P1"/>
      <text:p text:style-name="P1"><text:span text:style-name="T1">[Guilherme]</text:span> Não parece haver um consenso sobre as então <text:span text:style-name="T1">chamadas "bolhas" (se é que existem)</text:span>. Tomando o TikTok, por exemplo, os <text:span text:style-name="T1">processos de diferenciação e integração</text:span> sociais, tão caros à sociologia, merecem atenção. A temporalidade aqui parece importante, permitindo ao aplicativo alocar conteúdos "gerais" e "nichados" a um usuário, que, a meu ver, não precisa ser visto como indivíduo, mas um feixe de vetores e parâmetros computacionais.</text:p>
      <text:p text:style-name="P1"/>
      <text:p text:style-name="P1"/>
      <text:list xml:id="list181243072439540" text:continue-numbering="true" text:style-name="WWNum1">
        <text:list-item>
          <text:p text:style-name="P5"><text:span text:style-name="T3">PODER INSTITUCIONAL/ CAPACIDADES DOS ALGORITMOS</text:span></text:p>
        </text:list-item>
      </text:list>
      <text:p text:style-name="P3"/>
      <text:p text:style-name="P1"><text:span text:style-name="T1">[Segatto]</text:span> [<text:span text:style-name="T9">IA modifica/manipula preferências, agência, subjetividade, relações de poder e interações. Ações e interações moldam instituições, logo haveriam resistências. Como articular poderes dos algoritmos e resistências com os desenvolvedores?</text:span>]</text:p>
      <text:p text:style-name="P6"><text:span text:style-name="T10">IA modifica preferências, agência, subjetividade, relações de poder e interações.<text:tab/>- “That is, the algorithmic system frames most of what, when, and how users will choose their interactions with the platform”</text:span></text:p>
      <text:p text:style-name="P6"><text:span text:style-name="T10">- “As institutions, recommendation algorithms shape the power relations in society, setting contexts for preference formation, fragmenting the access to expressions of preference, and giving a set of actors additional strength to influence preferences and behaviours</text:span></text:p>
      <text:p text:style-name="P6"><text:span text:style-name="T10">- “we have advanced the argument that algorithms are institutions that should be thought of as sociotechnical artefacts that shape individual behaviour and collective choices”</text:span></text:p>
      <text:p text:style-name="P6"><text:span text:style-name="T10">- “they structure and frame spaces within which human interactions take place. Algorithmic recommendation systems, like other institutions, make use of formal and informal rules to influence user beliefs and values”</text:span></text:p>
      <text:p text:style-name="P6"><text:span text:style-name="T10">E a ação e a interação constituem ou moldam as instituições - gaming (“gaming the system refers to situations in which users interact with an algorithmic system to foster certain types of outcomes without resorting to frontal attacks, such as hacking”)? Mas não seria resistência?</text:span></text:p>
      <text:p text:style-name="P6"><text:span text:style-name="T10">- “Algorithms, like other institutions, change over time in response to pressures and demands on specific issues raised by society and businesses”</text:span></text:p>
      <text:p text:style-name="P6"><text:span text:style-name="T10">Mas depois mencionam manipulação das pessoas pelo algoritmo…</text:span></text:p>
      <text:p text:style-name="P6"><text:span text:style-name="T10">Como articular isso com pessoas que constroem sistemas?</text:span></text:p>
      <text:p text:style-name="P6"><text:span text:style-name="T10">- “Our point here is that the institutionalist framework creates a social context that surrounds the algorithm, where society has a role in interacting with developers to construct rules and norms for the ethical decisions involved in life-and- death decisions achieved through algorithms. And such a role becomes more prominent in critical junctures, as crises often work as exogenous shocks, opening room for agency. Individuals’ interactions with the algorithmic sys- tem shape physician preferences and have an impact on patients in different ways, with many ethical dilemmas”</text:span></text:p>
      <text:p text:style-name="P2"/>
      <text:p text:style-name="P1"><text:span text:style-name="T1">[Veri] 3. Sobre a ideia de “poder institucional” dos algoritmos</text:span></text:p>
      <text:p text:style-name="P1"><text:soft-page-break/>[<text:span text:style-name="T9">Poder institucional </text:span><text:span text:style-name="T2">tipos</text:span><text:span text:style-name="T9">: controle da atenção; reestruturação de processos sociais; classificação; decisões de vida e morte; extração de dados; poder discursivo. E </text:span><text:span text:style-name="T2">atributos</text:span><text:span text:style-name="T9">: ubiquidade, opacidade, automação de decisões, confiança dos usuários, falta de supervisão, transparência e meios de responsabilização. E </text:span><text:span text:style-name="T2">problemas lógicos/conceituais</text:span><text:span text:style-name="T9">: mistura de diferentes tipos de poder, generalização indevida de particularidades, confusão entre algoritmos e plataformas, conceito de instituição impreciso, confusão entre correlação e causalidade.</text:span>]</text:p>
      <text:p text:style-name="P6"><text:span text:style-name="T10">O “poder institucional” dos algoritmos de recomendação refere-se à sua capacidade de influenciar e moldar comportamentos sociais, decisões individuais e coletivas, e estruturas de poder na sociedade.</text:span></text:p>
      <text:p text:style-name="P6"><text:span text:style-name="T10">Este poder se manifesta de várias formas:</text:span></text:p>
      <text:p text:style-name="P6"><text:span text:style-name="T10">a) exercem </text:span><text:span text:style-name="T11">controle</text:span><text:span text:style-name="T10"> significativo sobre a </text:span><text:span text:style-name="T11">atenção humana</text:span><text:span text:style-name="T10">. Eles determinam o que bilhões de pessoas veem, ouvem e leem diariamente. </text:span></text:p>
      <text:p text:style-name="P6"><text:span text:style-name="T10">b) </text:span><text:span text:style-name="T11">reestruturaram fundamentalmente processos sociais</text:span><text:span text:style-name="T10"> importantes. O texto menciona como as plataformas de relacionamento online com recomendadores algorítmicos transformaram a maneira como casais se conhecem, tornando-se o método mais comum para formação de relações nos EUA e potencialmente afetando taxas de casamento e sua estabilidade.</text:span></text:p>
      <text:p text:style-name="P6"><text:span text:style-name="T10">c) estes sistemas têm poder de </text:span><text:span text:style-name="T11">classificação e categorização</text:span><text:span text:style-name="T10">. Eles decidem quais conteúdos são relevantes, quais merecem visibilidade, e quais permanecem invisíveis. </text:span></text:p>
      <text:p text:style-name="P6"><text:span text:style-name="T10">d) em casos como o algoritmo de alocação de rins, eles literalmente tomam </text:span><text:span text:style-name="T11">decisões de vida ou morte</text:span><text:span text:style-name="T10">. O poder de determinar quem recebe um órgão vital representa uma forma extrema de poder institucional, tradicionalmente reservado a instituições médicas e comitês éticos.</text:span></text:p>
      <text:p text:style-name="P6"><text:span text:style-name="T10">e) eles operam como mecanismos de </text:span><text:span text:style-name="T11">extração de dados</text:span><text:span text:style-name="T10">, o que o texto caracteriza como uma forma de "colonialismo de dados". Esta capacidade de extrair comportamentos e preferências sem compensação adequada ou consentimento genuíno representa uma assimetria de poder significativa entre as plataformas e seus usuários.</text:span></text:p>
      <text:p text:style-name="P6"><text:span text:style-name="T10">f) eles têm </text:span><text:span text:style-name="T11">poder discursivo, moldando [formas de enunciação]</text:span><text:span text:style-name="T10"> como as informações circulam na sociedade. A menção à disseminação de desinformação e teorias conspiratórias sugere que estes algoritmos podem influenciar o discurso público e potencialmente afetar processos democráticos.</text:span></text:p>
      <text:p text:style-name="P6"><text:span text:style-name="T10">Supostamente, o poder institucional destes algoritmos deriva de sua</text:span><text:span text:style-name="T11"> ubiquidade, opacidade, capacidade de tomar decisões automatizadas em escala massiva</text:span><text:span text:style-name="T10">, e da confiança que os usuários depositam neles para navegar num mundo de informação abundante. Diferente de instituições tradicionais, este poder frequentemente opera sem supervisão democrática adequada, transparência ou mecanismos de responsabilização, o que amplifica ainda mais seu impacto institucional na sociedade contemporânea.</text:span></text:p>
      <text:p text:style-name="P6"><text:span text:style-name="T10">Porém, o argumento sobre o "poder institucional dos algoritmos de recomendação apresenta vários problemas lógicos e conceituais:</text:span></text:p>
      <text:p text:style-name="P6"><text:span text:style-name="T10">a. Conflação de diferentes tipos de poder</text:span></text:p>
      <text:p text:style-name="P6"><text:span text:style-name="T10">O texto mistura diferentes tipos de poder sem estabelecer distinções claras. Por exemplo:</text:span></text:p>
      <text:p text:style-name="P6"><text:span text:style-name="T10">•<text:tab/>O controle sobre a atenção humana (ponto a) é um tipo de poder cognitivo ou atencional</text:span></text:p>
      <text:p text:style-name="P6"><text:span text:style-name="T10">•<text:tab/>A tomada de decisões sobre transplantes (ponto d) é um poder decisório direto</text:span></text:p>
      <text:p text:style-name="P6"><text:span text:style-name="T10">•<text:tab/>A extração de dados (ponto e) representa um poder econômico ou de exploração</text:span></text:p>
      <text:p text:style-name="P6"><text:span text:style-name="T10">•<text:tab/>O poder discursivo (ponto f) é de natureza completamente diferente</text:span></text:p>
      <text:p text:style-name="P6"><text:span text:style-name="T10">Estes diferentes tipos de poder têm mecanismos, impactos e implicações éticas distintas, mas o argumento os trata como manifestações equivalentes de um único "poder institucional".</text:span></text:p>
      <text:p text:style-name="P6"><text:span text:style-name="T10">b. Atribuição ao geral do que pertence ao particular</text:span></text:p>
      <text:p text:style-name="P6"><text:span text:style-name="T10">Há um erro lógico importante de generalização inadequada. O texto atribui à categoria geral "algoritmos de recomendação" características que pertencem apenas a algoritmos específicos em contextos específicos:</text:span></text:p>
      <text:p text:style-name="P6"><text:span text:style-name="T10">•<text:tab/>O algoritmo de alocação de rins é um caso muito particular que opera em um contexto altamente regulado e com propósitos muito diferentes dos algoritmos comerciais de plataformas sociais</text:span></text:p>
      <text:p text:style-name="P6"><text:soft-page-break/><text:span text:style-name="T10">•<text:tab/>Os algoritmos que supostamente contribuíram para a violência em Myanmar representam um caso extremo, não a norma</text:span></text:p>
      <text:p text:style-name="P6"><text:span text:style-name="T10">•<text:tab/>Nem todos os algoritmos de recomendação operam com "opacidade" ou "sem supervisão democrática"</text:span></text:p>
      <text:p text:style-name="P6"><text:span text:style-name="T10">c. Confusão entre algoritmos e plataformas</text:span></text:p>
      <text:p text:style-name="P6"><text:span text:style-name="T10">O argumento frequentemente não distingue entre:</text:span></text:p>
      <text:p text:style-name="P6"><text:span text:style-name="T10">•<text:tab/>O poder dos algoritmos em si</text:span></text:p>
      <text:p text:style-name="P6"><text:span text:style-name="T10">•<text:tab/>O poder das plataformas que os implementam</text:span></text:p>
      <text:p text:style-name="P6"><text:span text:style-name="T10">•<text:tab/>O poder das empresas que controlam essas plataformas</text:span></text:p>
      <text:p text:style-name="P6"><text:span text:style-name="T10">Por exemplo, a "extração de dados" não é uma propriedade inerente aos algoritmos de recomendação, mas uma prática comercial das empresas que os utilizam.</text:span></text:p>
      <text:p text:style-name="P6"><text:span text:style-name="T10">d.. Uso impreciso do conceito de instituição</text:span></text:p>
      <text:p text:style-name="P6"><text:span text:style-name="T10">O texto adota uma definição muito ampla e imprecisa de "instituição" que difere significativamente de um <text:s/>conceito mais clássico e bem definido (por exemplo, Weber e tradição subsequente). As instituições clássicas têm:</text:span></text:p>
      <text:p text:style-name="P6"><text:span text:style-name="T10">•<text:tab/>Legitimidade socialmente reconhecida</text:span></text:p>
      <text:p text:style-name="P6"><text:span text:style-name="T10">•<text:tab/>Mecanismos de accountability</text:span></text:p>
      <text:p text:style-name="P6"><text:span text:style-name="T10">•<text:tab/>Estruturas formais de governança</text:span></text:p>
      <text:p text:style-name="P6"><text:span text:style-name="T10">•<text:tab/>Processos definidos de mudança</text:span></text:p>
      <text:p text:style-name="P6"><text:span text:style-name="T10">Os algoritmos de recomendação geralmente carecem dessas características, exceto em casos específicos como o algoritmo de alocação dos rins.</text:span></text:p>
      <text:p text:style-name="P6"><text:span text:style-name="T10">Por mais que os autores se alinhem a essa vertente de institucionalismo discursivo e construtivista e neo-institucionalismo histórico, é importante manter um contraponto.</text:span></text:p>
      <text:p text:style-name="P6"><text:span text:style-name="T10">e. Confusão entre correlação e causalidade</text:span></text:p>
      <text:p text:style-name="P6"><text:span text:style-name="T10">O argumento atribui aos algoritmos mudanças sociais que podem ter múltiplas causas. Por exemplo, as transformações nas relações românticas (ponto b) resultam de uma complexa interação entre fatores tecnológicos, sociais, econômicos e culturais, não apenas dos algoritmos de recomendação.</text:span></text:p>
      <text:p text:style-name="P4"/>
      <text:p text:style-name="P1"><text:span text:style-name="T1">[Píi]</text:span> O Leviathan representaria um modelo institucional de<text:span text:style-name="T1"> base territorial e monopolizador</text:span> de uma multiplicidade de funções, que toma a centralização de base territorial como um princípio organizacional (Michael Mann). Por outro lado, muitos algoritmos são bastante especializados nas <text:span text:style-name="T1">funcionalidades</text:span> que oferecem dentro das rotinas, não exigindo uma mesma exclusividade e podendo ser intercalados com outros serviços semelhantes, logo, não seria relevante<text:span text:style-name="T1"> diferenciar o potencial monopolizador</text:span> de diferentes sistemas beneficiados por algoritmos? Qual a diferença entre o Amazon Web Services, o Basecamp e um dado sistema algorítmico implementado via licitação pública?</text:p>
      <text:p text:style-name="P1"/>
      <text:p text:style-name="P1"><text:soft-page-break/><text:span text:style-name="T3">(C) DEMOCRATIZAÇÃO</text:span></text:p>
      <text:p text:style-name="P1"/>
      <text:p text:style-name="P1"><text:span text:style-name="T1">[Segatto] Democratizar algoritmos </text:span>- “Democratic legitimacy requires the actual engagement of those affected by a decision in its construction” - reflexividade pública e valores dos cidadãos - equidade, pluralismo etc. -<text:span text:style-name="T1"> fechamento bem normativo</text:span></text:p>
      <text:p text:style-name="P2"/>
      <text:p text:style-name="P1"><text:span text:style-name="T1">[Píi] </text:span>Porque a <text:span text:style-name="T1">disseminação de desinformação</text:span> e conteúdo extremista gera <text:span text:style-name="T1">redução da confiança</text:span> nos sistemas algorítmicos, isso é sobre o ponto de vista de quais partes? [Bem normativo]</text:p>
      <text:p text:style-name="P2"/>
      <text:p text:style-name="P1"><text:span text:style-name="T1">[Veri] 2. Sobre democratização dos algoritmos:</text:span></text:p>
      <text:p text:style-name="P7">Na conclusão eles falam sobre <text:s/>“democratização dos algoritmos” , mas eles não explicitam exatamente o que entendem por “democratização”. Democratização como <text:span text:style-name="T1">transparência</text:span>? Democratização como possibilidade de <text:span text:style-name="T1">interação</text:span> com esses sistemas? Democratização como <text:span text:style-name="T1">participação em sua elaboração/execução</text:span>? Em algum momento eles dizem que “democratizar algoritmos” é considerá-los como assunto de <text:span text:style-name="T1">preocupação pública</text:span>. Em alguma medida, eles são, quando há debates sobre regulação.</text:p>
      <text:p text:style-name="P7">Ou será que eles estão pensando em deixar todos os algoritmos como “<text:span text:style-name="T1">open-source</text:span>”? <text:s/>No modelo acadêmico de compartilhamento de conhecimento?</text:p>
      <text:p text:style-name="P7"/>
      <text:p text:style-name="P1"><text:span text:style-name="T12">[Damiani]</text:span> Achei interessante a análise da democracia sob uma <text:span text:style-name="T1">perspectiva epistocrática</text:span>, na qual os algoritmos são apresentados como um problema quando discursivamente retratados como neutros e eficientes em suas tarefas. No entanto, não ficou claro como a democratização dessa instituição algorítmica deve ser conduzida: seria <text:span text:style-name="T1">por meio de código aberto</text:span>, de um <text:span text:style-name="T1">debate público</text:span> sobre os algoritmos ou de outra via institucional? Em alguns momentos, os autores distinguem os algoritmos do <text:span text:style-name="T1">setor público e do privado</text:span>, ambos deveriam passar pelo mesmo processo de democratização?</text:p>
      <text:p text:style-name="P7"><text:span text:style-name="T12">[Guilherme]</text:span><text:span text:style-name="T1"> </text:span>Poderiam ter se aprofundado um pouco mais. Não entendi, por exemplo, a <text:span text:style-name="T1">centralidade do "openness" nas políticas de IA nos países nórdicos</text:span>. Poderiam ter dito mais como ela aconteceu. E <text:span text:style-name="T1">que propostas são mais realistas</text:span> e, se não são, que "equivalentes funcionais" estariam em funcionamento para impedir a democratização dos sistemas algoritmicos?</text:p>
      <text:p text:style-name="P7"/>
      <text:p text:style-name="P7"><text:span text:style-name="T13">[Segatto]</text:span> Ameaça à democracia - dilemas de <text:span text:style-name="T1">autorização e accountability</text:span> - diferente de outras instituições políticas</text:p>
      <text:p text:style-name="P7"><text:span text:style-name="T13">[Guilherme]</text:span><text:span text:style-name="T14"> </text:span><text:span text:style-name="T1">Alçar algoritmos a instituições </text:span>parece uma boa jogada, que justifica a decisão de "<text:span text:style-name="T1">accountability</text:span>" dos sistemas. Grosseiramente, pensá-lo como algo da "<text:span text:style-name="T1">esfera pública</text:span>". Inclusive para tratá-la como "<text:span text:style-name="T1">fato social</text:span>"</text:p>
      <text:p text:style-name="P7"/>
      <text:p text:style-name="P7"><text:span text:style-name="T7">[Guilherme]</text:span><text:span text:style-name="T1"> Algocracia e epistocracia</text:span>. É possível levar adiante essa discussão sem tratar do <text:span text:style-name="T1">poder de big techs</text:span> no aparato público?</text:p>
      <text:p text:style-name="P7"><text:span text:style-name="T7">[Damiani]</text:span> Os autores mencionam o poder das plataformas digitais e o papel dos atores sociais (entendidos como as big techs) na conformação das relações de poder na sociedade. No entanto, esse ponto não é aprofundado. Discutir o <text:span text:style-name="T1">monopólio das plataformas</text:span> — que inclui o controle sobre os algoritmos — é fundamental para pensar a democratização desses sistemas. A responsabilização pelos efeitos dos algoritmos não pode ser pensada sem considerar o papel das big techs nesse processo.</text:p>
      <text:p text:style-name="P7"/>
      <text:p text:style-name="P1"><text:span text:style-name="T7">[Guilherme]</text:span> Não sei se ficou tão claro: "[Runcinam] notices that epistocratic trends are growing in contemporary polities that experience a simultaneous <text:span text:style-name="T1">overpoliticization</text:span> of issues ans attempts to <text:span text:style-name="T1">depolitize</text:span> areas of social life".</text:p>
      <text:p text:style-name="P7"/>
      <text:p text:style-name="P7"><text:soft-page-break/></text:p>
      <text:p text:style-name="P7"/>
      <text:p text:style-name="P7"><text:span text:style-name="T3">(D) EXPLICABILIDADE</text:span></text:p>
      <text:p text:style-name="P1"/>
      <text:p text:style-name="P7"><text:span text:style-name="T1">[Veri]</text:span> Em outro momento eles dizem que os algoritmos de empresas privadas (que acabam tendo consequências públicas) deveriam ser postas à escrutinação pública. Mas de que maneira? A questão da transparência envolve a questão da (não) <text:span text:style-name="T1">explicabilidade,</text:span> qual não foi mencionada em nenhum momento ao longo do livro. Como eles não entram em detalhes técnicos sobre o que eles estão chamando de “algoritmos”, acabam não diferenciando o que são modelos de redes neurais profundas (que são “caixas pretas”, muitas vezes não passíveis de explicabilidade) <text:s/>e outros algoritmos que são passíveis de escrutínio.</text:p>
      <text:p text:style-name="P7"/>
      <text:p text:style-name="P1"><text:span text:style-name="T1">[Veri] Sobre a homogeneização de diferentes tipos de algoritmos</text:span></text:p>
      <text:p text:style-name="P1">Um pouco fora da crítica ao poder é a atribuição sem critérios sobre o <text:span text:style-name="T1">grau de transparência / opacidade</text:span> que os diferentes algoritmos têm. Os algoritmos opacos são, na sua maioria, as redes neurais profundas. No entanto, os autores não particularizam esse caso e nem mencionam os trabalhos teóricos e aplicados de explainable AI.</text:p>
      <text:p text:style-name="P1"/>
      <text:p text:style-name="P1"><text:span text:style-name="T1">[Píi]</text:span> Ainda que a explicabilidade de ações humanas possa se prestar à opacidade, a opacidade de certos sistemas de ML e DL – ainda que se ignore o processo, as correlações estabelecidas, para focar nos resultados – parece trazer dificuldades na atribuição de responsabilidade/autoria pela ação solicitada, precipitada ou influenciada pelo sistema. Quer dizer, como no caso dos veículos driverless, em caso de um acidente fatal, o erro é do fabricante (A) ou do usuário (B), ou de outras partes que levaram a uma situação irremediável para A e B? Se um sistema algorítmico é acoplado a vários outros e mobilizado por muitas partes, a explicabilidade/transparência do conjunto do processo – em seus vários momentos – se torna muito pertinente, pois os inúmeros resultados parciais providos pela confluência das inúmeras partes se diluem no caráter processual (e talvez contínuo) do funcionamento desse sistema integrado.</text:p>
      <text:p text:style-name="P1"/>
      <text:p text:style-name="P1"><text:span text:style-name="T1">[Guilherme]</text:span> <text:span text:style-name="T1">Seriam os algoritmos de fato "novos" e "opacos" [</text:span>129]. Pasquinelli talvez não concordar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5" meta:word-count="2648" meta:character-count="18359" meta:non-whitespace-character-count="15781"/>
    <meta:generator>LibreOfficeDev/6.0.5.2$Linux_X86_64 LibreOffice_project/</meta:generator>
  </office:meta>
</office:document-meta>
</file>